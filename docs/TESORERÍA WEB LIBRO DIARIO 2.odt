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margin-top="0cm" fo:margin-bottom="0cm" style:contextual-spacing="false" fo:text-indent="0cm" style:auto-text-indent="false"/>
    </style:style>
    <style:style style:name="P3" style:family="paragraph" style:parent-style-name="Text_20_body" style:list-style-name="L1">
      <style:paragraph-properties fo:margin-left="0cm" fo:margin-right="0cm"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text-indent="0cm" style:auto-text-indent="false"/>
    </style:style>
    <style:style style:name="P6" style:family="paragraph" style:parent-style-name="Heading_20_3">
      <style:paragraph-properties fo:margin-left="0cm" fo:margin-right="0cm" fo:text-indent="0cm" style:auto-text-indent="false"/>
    </style:style>
    <style:style style:name="P7" style:family="paragraph" style:parent-style-name="Text_20_body" style:list-style-name="L3">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list-style-name="L4">
      <style:paragraph-properties fo:margin-left="0cm" fo:margin-right="0cm" fo:margin-top="0cm" fo:margin-bottom="0cm" style:contextual-spacing="false" fo:text-indent="0cm" style:auto-text-indent="false"/>
    </style:style>
    <style:style style:name="P10" style:family="paragraph" style:parent-style-name="Text_20_body" style:list-style-name="L4">
      <style:paragraph-properties fo:margin-left="0cm" fo:margin-right="0cm" fo:text-indent="0cm" style:auto-text-indent="false"/>
    </style:style>
    <style:style style:name="P11" style:family="paragraph" style:parent-style-name="Text_20_body" style:list-style-name="L5">
      <style:paragraph-properties fo:margin-left="0cm" fo:margin-right="0cm" fo:margin-top="0cm" fo:margin-bottom="0cm" style:contextual-spacing="false" fo:text-indent="0cm" style:auto-text-indent="false"/>
    </style:style>
    <style:style style:name="P12" style:family="paragraph" style:parent-style-name="Text_20_body" style:list-style-name="L5">
      <style:paragraph-properties fo:margin-left="0cm" fo:margin-right="0cm" fo:text-indent="0cm" style:auto-text-indent="false"/>
    </style:style>
    <style:style style:name="P13" style:family="paragraph" style:parent-style-name="Text_20_body" style:list-style-name="L6">
      <style:paragraph-properties fo:margin-left="0cm" fo:margin-right="0cm" fo:margin-top="0cm" fo:margin-bottom="0cm" style:contextual-spacing="false" fo:text-indent="0cm" style:auto-text-indent="false"/>
    </style:style>
    <style:style style:name="P14" style:family="paragraph" style:parent-style-name="Text_20_body" style:list-style-name="L6">
      <style:paragraph-properties fo:margin-left="0cm" fo:margin-right="0cm" fo:text-indent="0cm" style:auto-text-indent="false"/>
    </style:style>
    <style:style style:name="P15" style:family="paragraph" style:parent-style-name="Text_20_body" style:list-style-name="L7">
      <style:paragraph-properties fo:margin-left="0cm" fo:margin-right="0cm" fo:margin-top="0cm" fo:margin-bottom="0cm" style:contextual-spacing="false" fo:text-indent="0cm" style:auto-text-indent="false"/>
    </style:style>
    <style:style style:name="P16" style:family="paragraph" style:parent-style-name="Text_20_body" style:list-style-name="L7">
      <style:paragraph-properties fo:margin-left="0cm" fo:margin-right="0cm" fo:text-indent="0cm" style:auto-text-indent="false"/>
    </style:style>
    <style:style style:name="P17" style:family="paragraph" style:parent-style-name="Text_20_body" style:list-style-name="L8">
      <style:paragraph-properties fo:margin-left="0cm" fo:margin-right="0cm" fo:text-indent="0cm" style:auto-text-indent="false"/>
    </style:style>
    <style:style style:name="P18" style:family="paragraph" style:parent-style-name="Text_20_body" style:list-style-name="L9">
      <style:paragraph-properties fo:margin-left="0cm" fo:margin-right="0cm" fo:text-indent="0cm" style:auto-text-indent="false"/>
    </style:style>
    <style:style style:name="P19" style:family="paragraph" style:parent-style-name="Text_20_body" style:list-style-name="L9">
      <style:paragraph-properties fo:margin-left="0cm" fo:margin-right="0cm" fo:margin-top="0cm" fo:margin-bottom="0cm" style:contextual-spacing="false" fo:text-indent="0cm" style:auto-text-indent="false"/>
    </style:style>
    <style:style style:name="P20" style:family="paragraph" style:parent-style-name="Text_20_body" style:list-style-name="L10">
      <style:paragraph-properties fo:margin-left="0cm" fo:margin-right="0cm" fo:margin-top="0cm" fo:margin-bottom="0cm" style:contextual-spacing="false" fo:text-indent="0cm" style:auto-text-indent="false"/>
    </style:style>
    <style:style style:name="P21" style:family="paragraph" style:parent-style-name="Text_20_body" style:list-style-name="L10">
      <style:paragraph-properties fo:margin-left="0cm" fo:margin-right="0cm" fo:text-indent="0cm" style:auto-text-indent="false"/>
    </style:style>
    <style:style style:name="P22" style:family="paragraph" style:parent-style-name="Text_20_body" style:list-style-name="L11">
      <style:paragraph-properties fo:margin-left="0cm" fo:margin-right="0cm" fo:margin-top="0cm" fo:margin-bottom="0cm" style:contextual-spacing="false" fo:text-indent="0cm" style:auto-text-indent="false"/>
    </style:style>
    <style:style style:name="P23" style:family="paragraph" style:parent-style-name="Text_20_body" style:list-style-name="L11">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ASE 1: Diseño de la Arquitectura y Base de Datos</text:h>
      <text:p text:style-name="P1">Esta es la fase más crítica. Un error aquí comprometerá el cálculo de saldos futuros.</text:p>
      <text:p text:style-name="P1"><text:span text:style-name="Strong_20_Emphasis">1. Tablas Paramétricas (Catálogos - Sin ENUM)</text:span><text:line-break/>Crear migraciones para tablas que alimentarán selects en Livewire:</text:p>
      <text:list text:style-name="L1">
        <text:list-item>
          <text:p text:style-name="P2"><text:span text:style-name="Source_20_Text">tes_ld_tipo_transaccion</text:span>: (Entrada, Salida).</text:p>
        </text:list-item>
        <text:list-item>
          <text:p text:style-name="P2"><text:span text:style-name="Source_20_Text">tes_ld_concepto_entrada</text:span>: (Partida presupuestal, Reposición fondo fijo, Recaudación efectivo, Recaudación tarjeta, Recaudación transferencia, Acreditación bancaria POS, Depósito efectivo en banco, Transferencia a TGN, Ingreso estimativo, Devolución estimativo, Ingreso custodia).</text:p>
        </text:list-item>
        <text:list-item>
          <text:p text:style-name="P2"><text:span text:style-name="Source_20_Text">tes_ld_concepto_salida</text:span>: (Pago haberes, Pago viático interno, Pago viático externo, Pago meses anteriores, Entrega caja chica dependencia, Caja chica tesorería, Partida especial, Giro bancario, Depósito impagos, Egreso custodia, Traspaso estimativo).</text:p>
        </text:list-item>
        <text:list-item>
          <text:p text:style-name="P2"><text:span text:style-name="Source_20_Text">tes_ld_medio_pago_origen</text:span>: (Efectivo, Tarjeta crédito, Transferencia bancaria).</text:p>
        </text:list-item>
        <text:list-item>
          <text:p text:style-name="P2"><text:span text:style-name="Source_20_Text">tes_ld_medio_pago_ejecucion</text:span>: (Efectivo, Depósito bancario, Transferencia web).</text:p>
        </text:list-item>
        <text:list-item>
          <text:p text:style-name="P2"><text:span text:style-name="Source_20_Text">tes_ld_concepto_presupuestal</text:span>: (Sueldo, Retención judicial sueldo, Sueldo con quitas, Aguinaldo, Rechazo BROU, etc. - <text:span text:style-name="Emphasis">Aquí se detallan los motivos del "Personal Policial"</text:span>).</text:p>
        </text:list-item>
        <text:list-item>
          <text:p text:style-name="P2"><text:span text:style-name="Source_20_Text">tes_ld_tipo_caja_chica</text:span>: (Mensual, Quincenal, Especial, Puntual Tesorería).</text:p>
        </text:list-item>
        <text:list-item>
          <text:p text:style-name="P2"><text:span text:style-name="Source_20_Text">tes_ld_tipo_estimativo</text:span>: (Pagos varios, Giros).</text:p>
        </text:list-item>
        <text:list-item>
          <text:p text:style-name="P3"><text:span text:style-name="Source_20_Text">tes_ld_tipo_custodia</text:span>: (Arrendamiento, Prendas, Porte de armas, Multas tránsito, SOA, etc.).</text:p>
        </text:list-item>
      </text:list>
      <text:p text:style-name="P1"><text:span text:style-name="Strong_20_Emphasis">2. Tablas Transaccionales (El Libro Diario)</text:span><text:line-break/>El secreto aquí es usar una <text:span text:style-name="Strong_20_Emphasis">tabla maestra-flexible</text:span> y tablas de detalle. Además, permitir la autorreferencia para los sub-registros.</text:p>
      <text:list text:style-name="L2">
        <text:list-item>
          <text:p text:style-name="P4"><text:span text:style-name="Source_20_Text">tes_ld_partidas</text:span> (La caja o fondo)</text:p>
          <text:list>
            <text:list-item>
              <text:p text:style-name="P4">id, nombre (Ej: Caja Efectivo Principal, Cuenta Bancaria Brou, Fondo Fijo, Estimativo Pagos Varios Mes X), tipo_saldo (Efectivo, Bancario, Estimativo), saldo_actual.</text:p>
            </text:list-item>
          </text:list>
        </text:list-item>
        <text:list-item>
          <text:p text:style-name="P4"><text:span text:style-name="Source_20_Text">tes_ld_registros</text:span> (El libro diario - Asiento base)</text:p>
          <text:list>
            <text:list-item>
              <text:p text:style-name="P4">id, <text:span text:style-name="Source_20_Text">registro_padre_id</text:span> (FK a sí mismo para sub-registros/desgloses), <text:span text:style-name="Source_20_Text">partida_id</text:span> (De dónde sale o entra), <text:span text:style-name="Source_20_Text">tipo_transaccion_id</text:span>, <text:span text:style-name="Source_20_Text">concepto_entrada_id</text:span> (nullable), <text:span text:style-name="Source_20_Text">concepto_salida_id</text:span> (nullable), <text:span text:style-name="Source_20_Text">medio_pago_origen_id</text:span>, <text:span text:style-name="Source_20_Text">medio_pago_ejecucion_id</text:span>, fecha, descripcion, monto, <text:span text:style-name="Source_20_Text">comision_pos</text:span> (nullable, para descontar lo de la tarjeta), <text:span text:style-name="Source_20_Text">saldo_efectivo_resultante</text:span> (Snapshot), <text:span text:style-name="Source_20_Text">saldo_bancario_resultante</text:span> (Snapshot).</text:p>
            </text:list-item>
          </text:list>
        </text:list-item>
        <text:list-item>
          <text:p text:style-name="P4"><text:span text:style-name="Source_20_Text">tes_ld_detalles_presupuestales</text:span> (Para el desglose del "Personal Policial")</text:p>
          <text:list>
            <text:list-item>
              <text:p text:style-name="P4">id, <text:span text:style-name="Source_20_Text">registro_id</text:span>, <text:span text:style-name="Source_20_Text">concepto_presupuestal_id</text:span>, monto, detalle_adicional.</text:p>
            </text:list-item>
          </text:list>
        </text:list-item>
        <text:list-item>
          <text:p text:style-name="P4"><text:span text:style-name="Source_20_Text">tes_ld_detalles_viaticos</text:span> (Para viáticos internos/externos)</text:p>
          <text:list>
            <text:list-item>
              <text:p text:style-name="P4">id, <text:span text:style-name="Source_20_Text">registro_id</text:span>, tipo (Interno/Externo - <text:span text:style-name="Emphasis">o usar tabla paramétrica</text:span>), resumen_motivo, monto.</text:p>
            </text:list-item>
          </text:list>
        </text:list-item>
        <text:list-item>
          <text:p text:style-name="P4"><text:soft-page-break/><text:span text:style-name="Source_20_Text">tes_ld_custodias</text:span> (Fondos custodiados)</text:p>
          <text:list>
            <text:list-item>
              <text:p text:style-name="P4">id, <text:span text:style-name="Source_20_Text">tipo_custodia_id</text:span>, descripcion, saldo_actual.</text:p>
            </text:list-item>
          </text:list>
        </text:list-item>
        <text:list-item>
          <text:p text:style-name="P4"><text:span text:style-name="Source_20_Text">tes_ld_custodias_movimientos</text:span> (Entradas/salidas de custodias)</text:p>
          <text:list>
            <text:list-item>
              <text:p text:style-name="P4">id, <text:span text:style-name="Source_20_Text">custodia_id</text:span>, <text:span text:style-name="Source_20_Text">registro_id</text:span> (Vinculado al libro diario si aplica), tipo (Entrada/Salida), concepto, monto.</text:p>
            </text:list-item>
          </text:list>
        </text:list-item>
        <text:list-item>
          <text:p text:style-name="P4"><text:span text:style-name="Source_20_Text">tes_ld_estimativos</text:span> (Control de estimativos mensuales)</text:p>
          <text:list>
            <text:list-item>
              <text:p text:style-name="P5">id, tipo, mes, anio, monto_asignado, monto_utilizado, monto_pendiente_regularizar.</text:p>
            </text:list-item>
          </text:list>
        </text:list-item>
      </text:list>
      <text:p text:style-name="Horizontal_20_Line"/>
      <text:h text:style-name="P6" text:outline-level="3">FASE 2: Backend - Modelos y Lógica de Negocio (Laravel 9)</text:h>
      <text:p text:style-name="P1"><text:span text:style-name="Strong_20_Emphasis">1. Modelos y Relaciones Eloquent</text:span></text:p>
      <text:list text:style-name="L3">
        <text:list-item>
          <text:p text:style-name="P7">Configurar los Models (<text:span text:style-name="Source_20_Text">Registro</text:span>, <text:span text:style-name="Source_20_Text">Partida</text:span>, etc.) con las relaciones <text:span text:style-name="Source_20_Text">belongsTo</text:span>, <text:span text:style-name="Source_20_Text">hasMany</text:span> y la relación recursiva <text:span text:style-name="Source_20_Text">registroPadre()</text:span> y <text:span text:style-name="Source_20_Text">registrosHijos()</text:span> en el modelo <text:span text:style-name="Source_20_Text">Registro</text:span>.</text:p>
        </text:list-item>
        <text:list-item>
          <text:p text:style-name="P8"><text:span text:style-name="Emphasis">Importante:</text:span> Usar <text:span text:style-name="Strong_20_Emphasis">Soft Deletes</text:span> (<text:span text:style-name="Source_20_Text">SoftDeletes</text:span>) en <text:span text:style-name="Source_20_Text">tes_ld_registros</text:span> para evitar pérdidas de histórico si alguien borra por error, pero validando que no se alteren los saldos calculados.</text:p>
        </text:list-item>
      </text:list>
      <text:p text:style-name="P1"><text:span text:style-name="Strong_20_Emphasis">2. Servicios (App\Services)</text:span><text:line-break/>Crear clases de servicio para encapsular la lógica compleja, de modo que Livewire quede limpio.</text:p>
      <text:list text:style-name="L4">
        <text:list-item>
          <text:p text:style-name="P9"><text:span text:style-name="Source_20_Text">SaldoService</text:span>: Calcula y actualiza los saldos en <text:span text:style-name="Source_20_Text">tes_ld_partidas</text:span> (Efectivo y Bancario) y guarda el "snapshot" en el registro. <text:span text:style-name="Emphasis">Regla de oro: El saldo se calcula sumando/restando sobre el saldo anterior.</text:span></text:p>
        </text:list-item>
        <text:list-item>
          <text:p text:style-name="P9"><text:span text:style-name="Source_20_Text">EstimativoService</text:span>: Gestiona la resta al pagar, la adición al recibir devoluciones, permite saldos negativos y maneja los traspasos entre estimativos.</text:p>
        </text:list-item>
        <text:list-item>
          <text:p text:style-name="P10"><text:span text:style-name="Source_20_Text">CierreMensualService</text:span>: Ejecuta el "depósito de impagos", transfiere el remanente a la cuenta/partida correspondiente y deja solo el fondo fijo.</text:p>
        </text:list-item>
      </text:list>
      <text:p text:style-name="Horizontal_20_Line"/>
      <text:h text:style-name="P6" text:outline-level="3">FASE 3: Frontend - Componentes Livewire 2 y Alpine.js</text:h>
      <text:p text:style-name="P1">Dado que usas Bootstrap 4.6, la maquetación será con su grid y cards. Livewire manejará la reactividad y Alpine.js las interacciones menores (modales, toggles).</text:p>
      <text:p text:style-name="P1"><text:span text:style-name="Strong_20_Emphasis">1. Componente: </text:span><text:span text:style-name="Strong_20_Emphasis"><text:span text:style-name="Source_20_Text">LibroDiarioCreate</text:span></text:span></text:p>
      <text:list text:style-name="L5">
        <text:list-item>
          <text:p text:style-name="P11">Formulario principal. Selects dependientes (Alpine.js + Livewire): Si elijo "Entrada", me muestra conceptos de entrada; si "Salida", los de salida.</text:p>
        </text:list-item>
        <text:list-item>
          <text:p text:style-name="P11">Si elijo medio de pago "Tarjeta Crédito", Alpine muestra el campo "Comisión POS" y Livewire calcula el neto a acreditar en el banco.</text:p>
        </text:list-item>
        <text:list-item>
          <text:p text:style-name="P12">Botón "Agregar Detalle": Usa Alpine.js para añadir filas dinámicas de "Personal Policial" o "Viáticos" que luego Livewire procesa en un array.</text:p>
        </text:list-item>
      </text:list>
      <text:p text:style-name="P1"><text:span text:style-name="Strong_20_Emphasis">2. Componente: </text:span><text:span text:style-name="Strong_20_Emphasis"><text:span text:style-name="Source_20_Text">LibroDiarioIndex</text:span></text:span></text:p>
      <text:list text:style-name="L6">
        <text:list-item>
          <text:p text:style-name="P13">Tabla principal con buscador y filtros por fecha, tipo, concepto. Paginación de Laravel.</text:p>
        </text:list-item>
        <text:list-item>
          <text:p text:style-name="P14"><text:soft-page-break/>Columna "Ver Desglose": Un botón que con Alpine abre un acordeón o modal que muestra los sub-registros (hijos) de esa operación.</text:p>
        </text:list-item>
      </text:list>
      <text:p text:style-name="P1"><text:span text:style-name="Strong_20_Emphasis">3. Componente: </text:span><text:span text:style-name="Strong_20_Emphasis"><text:span text:style-name="Source_20_Text">GestionEstimativos</text:span></text:span></text:p>
      <text:list text:style-name="L7">
        <text:list-item>
          <text:p text:style-name="P15">Dashboard donde se ve el estado actual de los estimativos del mes.</text:p>
        </text:list-item>
        <text:list-item>
          <text:p text:style-name="P16">Formulario para realizar traspasos entre estimativos (crea un registro de salida de uno y entrada en otro).</text:p>
        </text:list-item>
      </text:list>
      <text:p text:style-name="P1"><text:span text:style-name="Strong_20_Emphasis">4. Componente: </text:span><text:span text:style-name="Strong_20_Emphasis"><text:span text:style-name="Source_20_Text">CierreMensual</text:span></text:span></text:p>
      <text:list text:style-name="L8">
        <text:list-item>
          <text:p text:style-name="P17">Botón que disparará el <text:span text:style-name="Source_20_Text">CierreMensualService</text:span>. Debe pedir confirmación con un modal de Alpine.</text:p>
        </text:list-item>
      </text:list>
      <text:p text:style-name="Horizontal_20_Line"/>
      <text:h text:style-name="P6" text:outline-level="3">FASE 4: Flujos de Trabajo Específicos y Validaciones</text:h>
      <text:p text:style-name="P1">En esta fase se programa la lógica de los casos particulares que mencionaste:</text:p>
      <text:list text:style-name="L9">
        <text:list-item>
          <text:p text:style-name="P18"><text:span text:style-name="Strong_20_Emphasis">Flujo de Tarjeta de Crédito a Banco a TGN:</text:span></text:p>
          <text:list>
            <text:list-item>
              <text:p text:style-name="P19">Al registrar una recaudación POS, el sistema debe permitir crear el "Registro Padre" (Entrada a caja por total) y un "Sub-registro" (Salida por comisión POS) para que el neto pase automáticamente a una cola de "Pendientes de acreditar al banco".</text:p>
            </text:list-item>
            <text:list-item>
              <text:p text:style-name="P19">Segundo paso: Registro de Acreditación Bancaria (Entrada al banco).</text:p>
            </text:list-item>
            <text:list-item>
              <text:p text:style-name="P19">Tercer paso: Transferencia a TGN (Salida del banco).</text:p>
            </text:list-item>
          </text:list>
        </text:list-item>
        <text:list-item>
          <text:p text:style-name="P18"><text:span text:style-name="Strong_20_Emphasis">Flujo de Impagos y Regularización:</text:span></text:p>
          <text:list>
            <text:list-item>
              <text:p text:style-name="P19">Al cerrar el mes, el <text:span text:style-name="Source_20_Text">CierreMensualService</text:span> genera una "Salida" por el monto de los impagos y los marca en una tabla de pendientes.</text:p>
            </text:list-item>
            <text:list-item>
              <text:p text:style-name="P19">Cuando se pagan en el mes siguiente, se valida si hay saldo en el "Estimativo". Si no hay, se permite el saldo negativo en la partida de estimativos. Al recibirse la partida específica (Entrada), se inyecta al estimativo (Entrada al estimativo con concepto "Regularización/Reposición").</text:p>
            </text:list-item>
          </text:list>
        </text:list-item>
        <text:list-item>
          <text:p text:style-name="P18"><text:span text:style-name="Strong_20_Emphasis">Giros y Pagos en Efectivo vs Web:</text:span></text:p>
          <text:list>
            <text:list-item>
              <text:p text:style-name="P19">Si el medio de pago ejecución es "Depósito bancario" (efectivo), resta del saldo de la Partida "Caja Efectivo" y añade movimiento bancario. Si es "Transferencia web", solo afecta saldo bancario.</text:p>
            </text:list-item>
          </text:list>
        </text:list-item>
        <text:list-item>
          <text:p text:style-name="P18"><text:span text:style-name="Strong_20_Emphasis">Custodias:</text:span></text:p>
          <text:list>
            <text:list-item>
              <text:p text:style-name="P18">Todo movimiento en <text:span text:style-name="Source_20_Text">tes_ld_custodias_movimientos</text:span> debe dispar un evento o llamada al <text:span text:style-name="Source_20_Text">SaldoService</text:span> para actualizar el <text:span text:style-name="Source_20_Text">saldo_actual</text:span> de la custodia sin alterar la caja general, a menos que el origen del dinero sea la caja principal (generando un doble registro interrelacionado).</text:p>
            </text:list-item>
          </text:list>
        </text:list-item>
      </text:list>
      <text:p text:style-name="Horizontal_20_Line"/>
      <text:h text:style-name="P6" text:outline-level="3">FASE 5: Reportes y Resúmenes</text:h>
      <text:list text:style-name="L10">
        <text:list-item>
          <text:p text:style-name="P20"><text:span text:style-name="Strong_20_Emphasis">Resumen Diario "Personal Policial":</text:span> Una vista Livewire que agrupe los registros del día por <text:span text:style-name="Source_20_Text">concepto_presupuestal_id</text:span> y totalice los montos.</text:p>
        </text:list-item>
        <text:list-item>
          <text:p text:style-name="P20"><text:soft-page-break/><text:span text:style-name="Strong_20_Emphasis">Arqueo de Caja:</text:span> Vista que cruza el saldo inicial del día + entradas - salidas y lo comparado con el saldo snapshot guardado en el último registro del día.</text:p>
        </text:list-item>
        <text:list-item>
          <text:p text:style-name="P21"><text:span text:style-name="Strong_20_Emphasis">Exportaciones:</text:span> Integrar paquetes como <text:span text:style-name="Source_20_Text">maatwebsite/excel</text:span> para exportar el Libro Diario a formato XLSX o CSV, muy requerido en organismos públicos.</text:p>
        </text:list-item>
      </text:list>
      <text:p text:style-name="Horizontal_20_Line"/>
      <text:h text:style-name="P6" text:outline-level="3">FASE 6: Pruebas y Despliegue</text:h>
      <text:list text:style-name="L11">
        <text:list-item>
          <text:p text:style-name="P22"><text:span text:style-name="Strong_20_Emphasis">Testing (PHPUnit):</text:span> Crear tests automáticos para el <text:span text:style-name="Source_20_Text">SaldoService</text:span> (que los saldos en efectivo y banco cuadren siempre) y para el <text:span text:style-name="Source_20_Text">CierreMensualService</text:span> (que el fondo fijo quede correctamente aislado).</text:p>
        </text:list-item>
        <text:list-item>
          <text:p text:style-name="P22"><text:span text:style-name="Strong_20_Emphasis">Validación de Permisos:</text:span> Asegurar que solo roles específicos puedan cerrar meses o hacer traspasos de estimativos.</text:p>
        </text:list-item>
        <text:list-item>
          <text:p text:style-name="P23"><text:span text:style-name="Strong_20_Emphasis">Despliegue en XAMPP:</text:span> Configurar el VirtualHost de Apache, optimizar <text:span text:style-name="Source_20_Text">php artisan config:cache</text:span> y <text:span text:style-name="Source_20_Text">route:cache</text:span> para entorno de producción en Windows.</text:p>
        </text:list-item>
      </text:list>
      <text:h text:style-name="P6" text:outline-level="3">Recomendación Clave de Arquitectura:</text:h>
      <text:p text:style-name="P1">Dado que mencionas <text:span text:style-name="Emphasis">"podría suceder más adelante"</text:span> respecto a controlar el saldo bancario, el diseño de la tabla <text:span text:style-name="Source_20_Text">tes_ld_partidas</text:span> y <text:span text:style-name="Source_20_Text">tes_ld_registros</text:span> con el campo <text:span text:style-name="Source_20_Text">saldo_bancario_resultante</text:span> (aunque hoy no se controle estrictamente, se irá calculando y guardando como historial) permitirá que, cuando Contabilidad decida tomar el control, el sistema ya tenga el histórico de reconstrucción de saldo bancario listo, sin necesidad de alterar la base de dato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4T15:34:40.890052000</meta:creation-date>
    <dc:date>2026-07-04T22:44:15.260752300</dc:date>
    <meta:editing-duration>PT6H59M18S</meta:editing-duration>
    <meta:editing-cycles>1</meta:editing-cycles>
    <meta:document-statistic meta:table-count="0" meta:image-count="0" meta:object-count="0" meta:page-count="4" meta:paragraph-count="72" meta:word-count="1149" meta:character-count="8130" meta:non-whitespace-character-count="7106"/>
    <meta:generator>LibreOffice/26.2.1.2$Windows_X86_64 LibreOffice_project/620$Build-2</meta:generator>
  </office:meta>
</office:document-meta>
</file>